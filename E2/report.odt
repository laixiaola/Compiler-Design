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72f" officeooo:paragraph-rsid="000fb72f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0fb72f" officeooo:paragraph-rsid="000fb72f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完成了符号表的设计</text:p>
      <text:p text:style-name="P3">采用<text:span text:style-name="Strong_20_Emphasis">链表结构实现符号表</text:span>，通过结构体保存符号属性，将不同类型的符号统一管理。</text:p>
      <text:p text:style-name="Text_20_body">整体设计分为以下几个部分：</text:p>
      <text:list xml:id="list1515708102" text:style-name="L1">
        <text:list-item>
          <text:p text:style-name="P4"><text:span text:style-name="Strong_20_Emphasis">类型系统设计</text:span> </text:p>
        </text:list-item>
        <text:list-item>
          <text:p text:style-name="P4"><text:span text:style-name="Strong_20_Emphasis">符号分类设计</text:span> </text:p>
        </text:list-item>
        <text:list-item>
          <text:p text:style-name="P4"><text:span text:style-name="Strong_20_Emphasis">符号表结构设计</text:span> </text:p>
        </text:list-item>
        <text:list-item>
          <text:p text:style-name="P4"><text:span text:style-name="Strong_20_Emphasis">函数管理设计</text:span> </text:p>
        </text:list-item>
        <text:list-item>
          <text:p text:style-name="P4"><text:span text:style-name="Strong_20_Emphasis">结构体管理设计</text:span> </text:p>
        </text:list-item>
        <text:list-item>
          <text:p text:style-name="P2"><text:span text:style-name="Strong_20_Emphasis">类型检查设计</text:span></text:p>
        </text:list-item>
      </text:list>
      <text:p text:style-name="P1">并于syntax文件中完成了符号表的生成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7-01T16:55:33.089930975</meta:creation-date>
    <dc:date>2026-07-01T16:58:32.382671972</dc:date>
    <meta:editing-duration>PT2M59S</meta:editing-duration>
    <meta:editing-cycles>1</meta:editing-cycles>
    <meta:document-statistic meta:table-count="0" meta:image-count="0" meta:object-count="0" meta:page-count="1" meta:paragraph-count="10" meta:word-count="118" meta:character-count="134" meta:non-whitespace-character-count="129"/>
    <meta:generator>LibreOffice/6.4.7.2$Linux_X86_64 LibreOffice_project/40$Build-2</meta:generator>
  </office:meta>
</office:document-meta>
</file>