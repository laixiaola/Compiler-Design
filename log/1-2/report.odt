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20000003E0524245F7DB3A3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d66" officeooo:paragraph-rsid="00095d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基于bison完成C—基本的语法分析，测试运行能够正确识别出语法错误</text:p>
      <text:p text:style-name="P1"><draw:frame draw:style-name="fr1" draw:name="图像1" text:anchor-type="char" svg:x="0.097cm" svg:y="0.381cm" svg:width="12.234cm" svg:height="1.312cm" draw:z-index="0"><draw:image xlink:href="Pictures/10000000000002420000003E0524245F7DB3A3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6-30T16:48:17.749081456</meta:creation-date>
    <dc:date>2026-06-30T16:49:41.110812256</dc:date>
    <meta:editing-duration>PT1M23S</meta:editing-duration>
    <meta:editing-cycles>1</meta:editing-cycles>
    <meta:document-statistic meta:table-count="0" meta:image-count="1" meta:object-count="0" meta:page-count="1" meta:paragraph-count="1" meta:word-count="29" meta:character-count="34" meta:non-whitespace-character-count="34"/>
    <meta:generator>LibreOffice/6.4.7.2$Linux_X86_64 LibreOffice_project/40$Build-2</meta:generator>
  </office:meta>
</office:document-meta>
</file>