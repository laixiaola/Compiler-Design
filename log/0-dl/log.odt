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8000003E4269FBC5D95D566C6.png" manifest:media-type="image/png"/>
  <manifest:file-entry manifest:full-path="Pictures/100000000000033A000000C34F086F00CE305870.png" manifest:media-type="image/png"/>
  <manifest:file-entry manifest:full-path="Pictures/10000000000003550000007D67CD1391124C4C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9840" officeooo:paragraph-rsid="000998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成功安装环境和相关软件</text:p>
      <text:p text:style-name="P1"><draw:frame draw:style-name="fr2" draw:name="图像1" text:anchor-type="paragraph" svg:width="17cm" svg:height="2.489cm" draw:z-index="0"><draw:image xlink:href="Pictures/10000000000003550000007D67CD1391124C4CAC.png" xlink:type="simple" xlink:show="embed" xlink:actuate="onLoad" loext:mime-type="image/png"/></draw:frame><draw:frame draw:style-name="fr1" draw:name="图像2" text:anchor-type="paragraph" svg:x="-0.106cm" svg:y="2.646cm" svg:width="17cm" svg:height="4.011cm" draw:z-index="1"><draw:image xlink:href="Pictures/100000000000033A000000C34F086F00CE305870.png" xlink:type="simple" xlink:show="embed" xlink:actuate="onLoad" loext:mime-type="image/png"/></draw:frame><draw:frame draw:style-name="fr1" draw:name="图像3" text:anchor-type="paragraph" svg:x="0cm" svg:y="7.458cm" svg:width="17cm" svg:height="16.284cm" draw:z-index="2"><draw:image xlink:href="Pictures/1000000000000428000003E4269FBC5D95D566C6.png" xlink:type="simple" xlink:show="embed" xlink:actuate="onLoad" loext:mime-type="image/png"/></draw:frame></text:p>
      <text:p text:style-name="P1"/>
      <text:p text:style-name="P1"/>
      <text:p text:style-name="P1">完成了词法分析的token部分定义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6-28T17:02:15.696663164</dc:date>
    <meta:editing-duration>PT9M11S</meta:editing-duration>
    <meta:editing-cycles>1</meta:editing-cycles>
    <meta:document-statistic meta:table-count="0" meta:image-count="3" meta:object-count="0" meta:page-count="1" meta:paragraph-count="2" meta:word-count="24" meta:character-count="28" meta:non-whitespace-character-count="28"/>
    <meta:generator>LibreOffice/6.4.7.2$Linux_X86_64 LibreOffice_project/40$Build-2</meta:generator>
  </office:meta>
</office:document-meta>
</file>