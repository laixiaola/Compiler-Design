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23E9590860C56533C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7d3" officeooo:paragraph-rsid="001227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完成了c—flex词法分析内容，测试运行如下</text:p>
      <text:p text:style-name="P1"><draw:frame draw:style-name="fr1" draw:name="图像1" text:anchor-type="paragraph" svg:width="17cm" svg:height="10.878cm" draw:z-index="0"><draw:image xlink:href="Pictures/10000000000003810000023E9590860C56533CAF.png" xlink:type="simple" xlink:show="embed" xlink:actuate="onLoad" loext:mime-type="image/png"/></draw:frame></text:p>
      <text:p text:style-name="P1">了解并初步做了一些bison语法分析内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6-29T15:53:21.628310197</meta:creation-date>
    <dc:date>2026-06-29T15:55:34.330815753</dc:date>
    <meta:editing-duration>PT2M13S</meta:editing-duration>
    <meta:editing-cycles>1</meta:editing-cycles>
    <meta:document-statistic meta:table-count="0" meta:image-count="1" meta:object-count="0" meta:page-count="1" meta:paragraph-count="2" meta:word-count="34" meta:character-count="42" meta:non-whitespace-character-count="42"/>
    <meta:generator>LibreOffice/6.4.7.2$Linux_X86_64 LibreOffice_project/40$Build-2</meta:generator>
  </office:meta>
</office:document-meta>
</file>